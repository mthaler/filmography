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6300000FA0B5F01C8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3.4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top="0cm" fo:margin-bottom="0cm" fo:line-height="200%"/>
    </style:style>
    <style:style style:name="P3" style:family="paragraph">
      <loext:graphic-properties draw:fill="none" draw:fill-color="#ffffff"/>
      <style:paragraph-properties fo:margin-top="0cm" fo:margin-bottom="0cm" fo:line-height="200%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1.25cm" svg:x="1cm" svg:y="0.75cm">
          <draw:text-box>
            <text:p>Rachel Weisz <text:s/>(* 1970)</text:p>
          </draw:text-box>
        </draw:frame>
        <draw:frame draw:style-name="gr2" draw:text-style-name="P1" draw:layer="layout" svg:width="6cm" svg:height="1cm" svg:x="11.5cm" svg:y="1.25cm">
          <draw:text-box>
            <text:p>Filme pro Dekade</text:p>
          </draw:text-box>
        </draw:frame>
        <draw:frame draw:style-name="gr3" draw:text-style-name="P3" draw:layer="layout" svg:width="10.5cm" svg:height="13.7cm" svg:x="1cm" svg:y="15cm">
          <draw:text-box>
            <text:p text:style-name="P2">Am bekanntesten ist Rachel Weisz vermutlich als Evelyn Carnahan in den Mumie Filmen. Sie hat aber auch in andere Filmen mitgespielt wie z.B. der ewige Gärtner.</text:p>
          </draw:text-box>
        </draw:frame>
        <draw:frame draw:style-name="gr4" draw:text-style-name="P4" draw:layer="layout" svg:width="9.543cm" svg:height="5.238cm" svg:x="10.15cm" svg:y="2.5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5" draw:layer="layout" svg:width="8.656cm" svg:height="13.022cm" svg:x="1.094cm" svg:y="1.75cm">
          <draw:image xlink:href="Pictures/1000000100000A6300000FA0B5F01C8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8:01:44.087822167</meta:creation-date>
    <dc:date>2026-03-24T10:04:27.790863624</dc:date>
    <meta:editing-duration>PT32M29S</meta:editing-duration>
    <meta:editing-cycles>21</meta:editing-cycles>
    <meta:generator>LibreOffice/25.8.5.2$Linux_X86_64 LibreOffice_project/580$Build-2</meta:generator>
    <meta:print-date>2025-12-05T08:27:09.980383089</meta:print-date>
    <meta:printed-by>PDF-Dateien</meta:printed-by>
    <meta:document-statistic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544cm" svg:height="5.239cm" xlink:href="." xlink:type="simple" chart:class="chart:bar" chart:style-name="ch1">
        <chart:plot-area chart:style-name="ch2" svg:x="0.358cm" svg:y="-0.199cm" svg:width="9.184cm" svg:height="5.064cm">
          <chart:coordinate-region svg:x="0.992cm" svg:y="0cm" svg:width="8.55cm" svg:height="4.218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990-19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00-2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0-20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&gt; 202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