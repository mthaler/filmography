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.25cm" svg:y="7.25cm">
          <draw:text-box>
            <text:p>Harrison Ford <text:s/>(* 1942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5cm" svg:height="6.431cm" svg:x="1cm" svg:y="0.819cm">
          <draw:image xlink:href="Pictures/1000000100000FA000000A9459295E65.png" xlink:type="simple" xlink:show="embed" xlink:actuate="onLoad" draw:mime-type="image/png">
            <text:p/>
          </draw:image>
        </draw:frame>
        <draw:frame draw:style-name="gr5" draw:text-style-name="P5" draw:layer="layout" svg:width="8.406cm" svg:height="4.689cm" svg:x="10.751cm" svg:y="2.5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3-24T09:58:19.212153258</dc:date>
    <meta:editing-duration>PT27M37S</meta:editing-duration>
    <meta:editing-cycles>18</meta:editing-cycles>
    <meta:generator>LibreOffice/25.8.5.2$Linux_X86_64 LibreOffice_project/580$Build-2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07cm" svg:height="4.69cm" xlink:href="." xlink:type="simple" chart:class="chart:bar" chart:style-name="ch1">
        <chart:plot-area chart:style-name="ch2" svg:x="0.168cm" svg:y="0.093cm" svg:width="8.071cm" svg:height="4.504cm">
          <chart:coordinate-region svg:x="0.953cm" svg:y="0.292cm" svg:width="7.286cm" svg:height="2.611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60-1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